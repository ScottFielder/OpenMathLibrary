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, 'Aptos EmbeddedFont', 'Aptos MSFontService', Calibri, Helvetica, sans-serif, serif, EmojiFont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loext:opacity="100%" style:font-name="Aptos" fo:font-size="12pt" fo:font-weight="bold"/>
    </style:style>
    <style:style style:name="P3" style:family="paragraph" style:parent-style-name="Standard">
      <style:paragraph-properties fo:margin-left="0in" fo:margin-right="0in" fo:margin-top="0in" fo:margin-bottom="0.1965in" style:contextual-spacing="false" fo:text-align="start" style:justify-single-word="false" fo:text-indent="0in" style:auto-text-indent="false"/>
      <style:text-properties fo:color="#000000" loext:opacity="100%" style:font-name="Aptos" fo:font-size="12pt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Text_20_body">
      <style:paragraph-properties fo:margin-left="0in" fo:margin-right="0in" fo:line-height="125%" fo:text-align="start" style:justify-single-word="false" fo:text-indent="0in" style:auto-text-indent="false"/>
      <style:text-properties fo:color="#000000" loext:opacity="100%" style:font-name="Aptos" fo:font-size="12pt" fo:font-weight="bold"/>
    </style:style>
    <style:style style:name="P7" style:family="paragraph" style:parent-style-name="Text_20_body" style:list-style-name="L2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8" style:family="paragraph" style:parent-style-name="Text_20_body" style:list-style-name="L2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Quotations">
      <style:paragraph-properties fo:margin-left="0.3937in" fo:margin-right="0.3937in" fo:text-align="start" style:justify-single-word="false" fo:text-indent="0in" style:auto-text-indent="false" fo:padding-left="0.0193in" fo:padding-right="0in" fo:padding-top="0in" fo:padding-bottom="0in" fo:border-left="3pt solid #d0d7de" fo:border-right="none" fo:border-top="none" fo:border-bottom="none"/>
      <style:text-properties fo:color="#000000" loext:opacity="100%" style:font-name="Aptos" fo:font-size="12pt"/>
    </style:style>
    <style:style style:name="T1" style:family="text">
      <style:text-properties fo:color="#000000" loext:opacity="100%" style:font-name="Aptos" fo:font-size="12pt"/>
    </style:style>
    <style:style style:name="T2" style:family="text">
      <style:text-properties fo:color="#000000" loext:opacity="100%" fo:font-family="'Cascadia Code', Consolas, SFMono-Regular, monospace" fo:font-size="12pt"/>
    </style:style>
    <style:style style:name="T3" style:family="text">
      <style:text-properties fo:color="#000000" loext:opacity="100%" style:font-name="Aptos" fo:font-size="12pt" fo:font-weight="bold"/>
    </style:style>
    <style:style style:name="T4" style:family="text">
      <style:text-properties fo:font-style="italic"/>
    </style:style>
    <style:style style:name="T5" style:family="text">
      <style:text-properties fo:color="#000000" loext:opacity="100%" fo:font-family="'Cascadia Code', Consolas, SFMono-Regular, monospace" fo:font-size="12pt" fo:font-weight="bold"/>
    </style:style>
    <style:style style:name="T6" style:family="text">
      <style:text-properties fo:color="#000000" loext:opacity="100%" fo:font-family="Aptos, 'Aptos EmbeddedFont', 'Aptos MSFontService', Calibri, Helvetica, sans-serif" fo:font-size="12pt"/>
    </style:style>
    <style:style style:name="T7" style:family="text">
      <style:text-properties fo:color="#000000" loext:opacity="100%" fo:font-family="Aptos, 'Aptos EmbeddedFont', 'Aptos MSFontService', Calibri, Helvetica, sans-serif" fo:font-size="12pt" fo:font-weight="bold"/>
    </style:style>
    <style:style style:name="T8" style:family="text">
      <style:text-properties fo:color="#000000" loext:opacity="100%" fo:font-family="Aptos, 'Aptos EmbeddedFont', 'Aptos MSFontService', Calibri, Helvetica, sans-serif" fo:font-size="12pt" fo:font-style="italic"/>
    </style:style>
    <style:style style:name="T9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l four projects link the same </text:span><text:span text:style-name="Source_20_Text"><text:span text:style-name="T2">MathLibrary</text:span></text:span><text:span text:style-name="T1">, so a bug or confusing name here is inherited by every semester. The good news: the core beginner-facing types (</text:span><text:span text:style-name="Source_20_Text"><text:span text:style-name="T2">Vec2/3/4</text:span></text:span><text:span text:style-name="T1">, </text:span><text:span text:style-name="Source_20_Text"><text:span text:style-name="T2">Matrix2/3/4</text:span></text:span><text:span text:style-name="T1">, </text:span><text:span text:style-name="Source_20_Text"><text:span text:style-name="T2">MMath</text:span></text:span><text:span text:style-name="T1">, </text:span><text:span text:style-name="Source_20_Text"><text:span text:style-name="T2">VMath</text:span></text:span><text:span text:style-name="T1">, </text:span><text:span text:style-name="Source_20_Text"><text:span text:style-name="T2">QMath</text:span></text:span><text:span text:style-name="T1">) are clean and well commented. The issues below are a mix of </text:span><text:span text:style-name="T3">real bugs</text:span><text:span text:style-name="T1"> (worth fixing regardless of pedagogy) and </text:span><text:span text:style-name="T3">beginner-friendliness / consistency</text:span><text:span text:style-name="T1"> opportunities.</text:span></text:p>
      <text:section text:style-name="Sect1" text:name="x_7a-real-bugs">
        <text:p text:style-name="P2">a. Real bugs</text:p>
      </text:section>
      <text:p text:style-name="P3">These are genuine defects, not style. Most sit on rarely-taken paths (error guards, the 3×3 inverse), which is why they have survived — but they will bite a student eventually and several are <text:span text:style-name="T4">silently wrong</text:span> rather than crashing.</text:p>
      <text:list text:style-name="L1">
        <text:list-item>
          <text:p text:style-name="P4"><text:span text:style-name="Source_20_Text"><text:span text:style-name="T5">__FILE__ + __LINE__</text:span></text:span><text:span text:style-name="T6"> </text:span><text:span text:style-name="T7">builds garbage, not a message.</text:span><text:span text:style-name="T6"> Repeated in </text:span><text:span text:style-name="Source_20_Text"><text:span text:style-name="T2">Vector.h</text:span></text:span><text:span text:style-name="T6"> (×6), </text:span><text:span text:style-name="Source_20_Text"><text:span text:style-name="T2">VMath.h</text:span></text:span><text:span text:style-name="T6"> (×5), and </text:span><text:span text:style-name="Source_20_Text"><text:span text:style-name="T2">MMath.h</text:span></text:span><text:span text:style-name="T6"> (×2), e.g. </text:span><text:span text:style-name="Source_20_Text"><text:span text:style-name="T2">std::string errorMsg = __FILE__ + __LINE__;</text:span></text:span><text:span text:style-name="T6">. </text:span><text:span text:style-name="Source_20_Text"><text:span text:style-name="T2">__FILE__</text:span></text:span><text:span text:style-name="T6"> is a </text:span><text:span text:style-name="Source_20_Text"><text:span text:style-name="T2">const char*</text:span></text:span><text:span text:style-name="T6"> and </text:span><text:span text:style-name="Source_20_Text"><text:span text:style-name="T2">__LINE__</text:span></text:span><text:span text:style-name="T6"> is an </text:span><text:span text:style-name="Source_20_Text"><text:span text:style-name="T2">int</text:span></text:span><text:span text:style-name="T6">, so this is </text:span><text:span text:style-name="T8">pointer arithmetic</text:span><text:span text:style-name="T6"> — it advances the pointer ~120+ characters past the start of the filename literal and then constructs a </text:span><text:span text:style-name="Source_20_Text"><text:span text:style-name="T2">std::string</text:span></text:span><text:span text:style-name="T6"> from out-of-bounds memory (undefined behaviour / likely crash) on the very error path that is supposed to help the student. Fix once, everywhere: </text:span><text:span text:style-name="Source_20_Text"><text:span text:style-name="T2">std::string(__FILE__) + ":" + std::to_string(__LINE__) + " Divide by nearly zero"</text:span></text:span><text:span text:style-name="T6">.</text:span></text:p>
        </text:list-item>
        <text:list-item>
          <text:p text:style-name="P4"><text:span text:style-name="Source_20_Text"><text:span text:style-name="T5">Matrix2</text:span></text:span><text:span text:style-name="T6"> </text:span><text:span text:style-name="T7">determinant is wrong</text:span><text:span text:style-name="T6"> (</text:span><text:span text:style-name="Source_20_Text"><text:span text:style-name="T2">MMath.h</text:span></text:span><text:span text:style-name="T6">, </text:span><text:span text:style-name="Source_20_Text"><text:span text:style-name="T2">determinate(const Matrix2&amp;)</text:span></text:span><text:span text:style-name="T6">): </text:span><text:span text:style-name="Source_20_Text"><text:span text:style-name="T2">return m[0] * m[3] - m[3] * m[1];</text:span></text:span><text:span text:style-name="T6"> uses </text:span><text:span text:style-name="Source_20_Text"><text:span text:style-name="T2">m[3]</text:span></text:span><text:span text:style-name="T6"> twice. For a column-major 2×2 it must be </text:span><text:span text:style-name="Source_20_Text"><text:span text:style-name="T2">m[0]*m[3] - m[2]*m[1]</text:span></text:span><text:span text:style-name="T6">. Currently it returns the wrong value for any non-trivial matrix.</text:span></text:p>
        </text:list-item>
        <text:list-item>
          <text:p text:style-name="P4"><text:span text:style-name="Source_20_Text"><text:span text:style-name="T5">Matrix3</text:span></text:span><text:span text:style-name="T6"> </text:span><text:span text:style-name="T7">inverse has a typo in the adjugate</text:span><text:span text:style-name="T6"> (</text:span><text:span text:style-name="Source_20_Text"><text:span text:style-name="T2">MMath.h</text:span></text:span><text:span text:style-name="T6">, </text:span><text:span text:style-name="Source_20_Text"><text:span text:style-name="T2">inverse(const Matrix3&amp;)</text:span></text:span><text:span text:style-name="T6">): </text:span><text:span text:style-name="Source_20_Text"><text:span text:style-name="T2">adjointM[7] = -transposeM[0] * transposeM[5] + transposeM[3] * transposeM[5];</text:span></text:span><text:span text:style-name="T6"> — the second </text:span><text:span text:style-name="Source_20_Text"><text:span text:style-name="T2">transposeM[5]</text:span></text:span><text:span text:style-name="T6"> should be </text:span><text:span text:style-name="Source_20_Text"><text:span text:style-name="T2">transposeM[2]</text:span></text:span><text:span text:style-name="T6">. The 3×3 inverse is therefore incorrect for a general matrix. (It is also effectively untested: </text:span><text:span text:style-name="Source_20_Text"><text:span text:style-name="T2">inverseTestMat4()</text:span></text:span><text:span text:style-name="T6"> accidentally passes the </text:span><text:span text:style-name="Source_20_Text"><text:span text:style-name="T2">Matrix4</text:span></text:span><text:span text:style-name="T6"> </text:span><text:span text:style-name="Source_20_Text"><text:span text:style-name="T2">rot</text:span></text:span><text:span text:style-name="T6"> into the 3×3 path instead of </text:span><text:span text:style-name="Source_20_Text"><text:span text:style-name="T2">rot3</text:span></text:span><text:span text:style-name="T6">.)</text:span></text:p>
        </text:list-item>
        <text:list-item>
          <text:p text:style-name="P4"><text:span text:style-name="T7">Quaternion </text:span><text:span text:style-name="Source_20_Text"><text:span text:style-name="T5">slerp</text:span></text:span><text:span text:style-name="T6"> </text:span><text:span text:style-name="T7">shortest-path fix is a no-op</text:span><text:span text:style-name="T6"> (</text:span><text:span text:style-name="Source_20_Text"><text:span text:style-name="T2">QMath.h</text:span></text:span><text:span text:style-name="T6">): when </text:span><text:span text:style-name="Source_20_Text"><text:span text:style-name="T2">cosTheta &lt; 0</text:span></text:span><text:span text:style-name="T6"> the code flips </text:span><text:span text:style-name="Source_20_Text"><text:span text:style-name="T2">q2 = -q2</text:span></text:span><text:span text:style-name="T6"> but then writes </text:span><text:span text:style-name="Source_20_Text"><text:span text:style-name="T2">cosTheta = cosTheta;</text:span></text:span><text:span text:style-name="T6"> — it should be </text:span><text:span text:style-name="Source_20_Text"><text:span text:style-name="T2">cosTheta = -cosTheta;</text:span></text:span><text:span text:style-name="T6">. Without it, </text:span><text:span text:style-name="Source_20_Text"><text:span text:style-name="T2">acos(cosTheta)</text:span></text:span><text:span text:style-name="T6"> is the </text:span><text:span text:style-name="T8">obtuse</text:span><text:span text:style-name="T6"> angle and the interpolation follows the long way around for more than a quarter-turn.</text:span></text:p>
        </text:list-item>
        <text:list-item>
          <text:p text:style-name="P4"><text:span text:style-name="Source_20_Text"><text:span text:style-name="T5">Vec4 operator-</text:span></text:span><text:span text:style-name="T6"> </text:span><text:span text:style-name="T7">subtracts </text:span><text:span text:style-name="Source_20_Text"><text:span text:style-name="T5">w</text:span></text:span><text:span text:style-name="T6"> </text:span><text:span text:style-name="T7">backwards</text:span><text:span text:style-name="T6"> (</text:span><text:span text:style-name="Source_20_Text"><text:span text:style-name="T2">Vector.h</text:span></text:span><text:span text:style-name="T6">): </text:span><text:span text:style-name="Source_20_Text"><text:span text:style-name="T2">return Vec4(x - v.x, y - v.y, z - v.z, v.w - w);</text:span></text:span><text:span text:style-name="T6"> — the </text:span><text:span text:style-name="Source_20_Text"><text:span text:style-name="T2">w</text:span></text:span><text:span text:style-name="T6"> term is reversed. It contradicts </text:span><text:span text:style-name="Source_20_Text"><text:span text:style-name="T2">operator-=</text:span></text:span><text:span text:style-name="T6"> (which does </text:span><text:span text:style-name="Source_20_Text"><text:span text:style-name="T2">w -= v.w</text:span></text:span><text:span text:style-name="T6">). Any Vec4 subtraction that relies on the </text:span><text:span text:style-name="Source_20_Text"><text:span text:style-name="T2">w</text:span></text:span><text:span text:style-name="T6"> channel gets the wrong sign.</text:span></text:p>
        </text:list-item>
        <text:list-item>
          <text:p text:style-name="P5"><text:span text:style-name="T7">Vec4's divide-by-zero guard never compiles in</text:span><text:span text:style-name="T6"> (</text:span><text:span text:style-name="Source_20_Text"><text:span text:style-name="T2">Vector.h</text:span></text:span><text:span text:style-name="T6">, </text:span><text:span text:style-name="Source_20_Text"><text:span text:style-name="T2">Vec4 operator / (float)</text:span></text:span><text:span text:style-name="T6">): it is wrapped in </text:span><text:span text:style-name="Source_20_Text"><text:span text:style-name="T2">#ifdef DEBUG</text:span></text:span><text:span text:style-name="T6">, while every other guard in the library uses </text:span><text:span text:style-name="Source_20_Text"><text:span text:style-name="T2">#ifdef _DEBUG</text:span></text:span><text:span text:style-name="T6"> (the MSVC symbol). So the one check beginners are most likely to trip is silently absent in Debug builds.</text:span></text:p>
        </text:list-item>
      </text:list>
      <text:section text:style-name="Sect1" text:name="x_7b-beginner-friendliness-consistency">
        <text:p text:style-name="P6">b. Beginner-friendliness &amp; consistency</text:p>
      </text:section>
      <text:list text:style-name="L2">
        <text:list-item>
          <text:p text:style-name="P7"><text:soft-page-break/><text:span text:style-name="T7">Pervasive misspellings in public names.</text:span><text:span text:style-name="T6"> These force students to memorise a </text:span><text:span text:style-name="T8">wrong</text:span><text:span text:style-name="T6"> spelling to use the API and break searchability: </text:span><text:span text:style-name="Source_20_Text"><text:span text:style-name="T2">determinate</text:span></text:span><text:span text:style-name="T6"> (→ determinant), </text:span><text:span text:style-name="Source_20_Text"><text:span text:style-name="T2">Colunm</text:span></text:span><text:span text:style-name="T6">/</text:span><text:span text:style-name="Source_20_Text"><text:span text:style-name="T2">colunm</text:span></text:span><text:span text:style-name="T6"> (→ column), </text:span><text:span text:style-name="Source_20_Text"><text:span text:style-name="T2">QUATERTNION_H</text:span></text:span><text:span text:style-name="T6">, </text:span><text:span text:style-name="Source_20_Text"><text:span text:style-name="T2">CONTSTANTSCONVERSIONS_H</text:span></text:span><text:span text:style-name="T6">, </text:span><text:span text:style-name="Source_20_Text"><text:span text:style-name="T2">DebugUtlities.h</text:span></text:span><text:span text:style-name="T6">, plus comment-level </text:span><text:span text:style-name="Source_20_Text"><text:span text:style-name="T2">matricies</text:span></text:span><text:span text:style-name="T6">, </text:span><text:span text:style-name="Source_20_Text"><text:span text:style-name="T2">Eular</text:span></text:span><text:span text:style-name="T6">, </text:span><text:span text:style-name="Source_20_Text"><text:span text:style-name="T2">communitive</text:span></text:span><text:span text:style-name="T6">, </text:span><text:span text:style-name="Source_20_Text"><text:span text:style-name="T2">percision</text:span></text:span><text:span text:style-name="T6">, </text:span><text:span text:style-name="Source_20_Text"><text:span text:style-name="T2">abitrary</text:span></text:span><text:span text:style-name="T6">, </text:span><text:span text:style-name="Source_20_Text"><text:span text:style-name="T2">declair</text:span></text:span><text:span text:style-name="T6">, </text:span><text:span text:style-name="Source_20_Text"><text:span text:style-name="T2">lamda</text:span></text:span><text:span text:style-name="T6">. Worth a one-time rename sweep (keep deprecated aliases if any assignment refers to the old names).</text:span></text:p>
        </text:list-item>
        <text:list-item>
          <text:p text:style-name="P7"><text:span text:style-name="T7">Three different </text:span><text:span text:style-name="Source_20_Text"><text:span text:style-name="T5">enum</text:span></text:span><text:span text:style-name="T6"> </text:span><text:span text:style-name="T7">styles for the same concept across sibling classes.</text:span><text:span text:style-name="T6"> </text:span><text:span text:style-name="Source_20_Text"><text:span text:style-name="T2">Matrix4</text:span></text:span><text:span text:style-name="T6"> uses an unscoped </text:span><text:span text:style-name="Source_20_Text"><text:span text:style-name="T2">enum Colunm { zero, one, two, three }</text:span></text:span><text:span text:style-name="T6">, </text:span><text:span text:style-name="Source_20_Text"><text:span text:style-name="T2">Matrix3</text:span></text:span><text:span text:style-name="T6"> uses a scoped </text:span><text:span text:style-name="Source_20_Text"><text:span text:style-name="T2">enum class Column { ... }</text:span></text:span><text:span text:style-name="T6"> (so callers write </text:span><text:span text:style-name="Source_20_Text"><text:span text:style-name="T2">Matrix3::Column::two</text:span></text:span><text:span text:style-name="T6">), and </text:span><text:span text:style-name="Source_20_Text"><text:span text:style-name="T2">Matrix2</text:span></text:span><text:span text:style-name="T6"> has none. Pick one convention (recommend scoped </text:span><text:span text:style-name="Source_20_Text"><text:span text:style-name="T2">enum class Column</text:span></text:span><text:span text:style-name="T6"> everywhere) so column access reads the same in every dimension.</text:span></text:p>
        </text:list-item>
        <text:list-item>
          <text:p text:style-name="P7"><text:span text:style-name="T7">Geometric-algebra members leak into the beginner types.</text:span><text:span text:style-name="T6"> </text:span><text:span text:style-name="Source_20_Text"><text:span text:style-name="T2">Vec3</text:span></text:span><text:span text:style-name="T6">/</text:span><text:span text:style-name="Source_20_Text"><text:span text:style-name="T2">Vec4</text:span></text:span><text:span text:style-name="T6"> expose an anonymous </text:span><text:span text:style-name="Source_20_Text"><text:span text:style-name="T2">struct { float e032, e013, e021; }</text:span></text:span><text:span text:style-name="T6"> union alias, and </text:span><text:span text:style-name="Source_20_Text"><text:span text:style-name="T2">Quaternion</text:span></text:span><text:span text:style-name="T6"> exposes </text:span><text:span text:style-name="Source_20_Text"><text:span text:style-name="T2">e32/e13/e21/real</text:span></text:span><text:span text:style-name="T6">. These PGA names mean nothing to a Sem 1–2 student reading the header and add visual noise to the very first class they meet. Consider moving the GA aliases into the advanced </text:span><text:span text:style-name="Source_20_Text"><text:span text:style-name="T2">...Ex</text:span></text:span><text:span text:style-name="T6"> layer, or at least commenting them clearly as "ignore until later."</text:span></text:p>
        </text:list-item>
        <text:list-item>
          <text:p text:style-name="P7"><text:span text:style-name="T7">Errors are thrown as raw </text:span><text:span text:style-name="Source_20_Text"><text:span text:style-name="T5">std::string</text:span></text:span><text:span text:style-name="T7">.</text:span><text:span text:style-name="T6"> Throwing a bare string can't be caught by </text:span><text:span text:style-name="Source_20_Text"><text:span text:style-name="T2">catch (const std::exception&amp;)</text:span></text:span><text:span text:style-name="T6"> and won't print via </text:span><text:span text:style-name="Source_20_Text"><text:span text:style-name="T2">.what()</text:span></text:span><text:span text:style-name="T6">. For teaching, a clear </text:span><text:span text:style-name="Source_20_Text"><text:span text:style-name="T2">throw std::runtime_error(...)</text:span></text:span><text:span text:style-name="T6"> (or a simple </text:span><text:span text:style-name="Source_20_Text"><text:span text:style-name="T2">assert</text:span></text:span><text:span text:style-name="T6"> with a message) is both safer and more recognisable.</text:span></text:p>
        </text:list-item>
        <text:list-item>
          <text:p text:style-name="P7"><text:span text:style-name="Source_20_Text"><text:span text:style-name="T5">Vec2</text:span></text:span><text:span text:style-name="T6"> </text:span><text:span text:style-name="T7">is a second-class citizen.</text:span><text:span text:style-name="T6"> It lacks the </text:span><text:span text:style-name="Source_20_Text"><text:span text:style-name="T2">operator float*()</text:span></text:span><text:span text:style-name="T6"> / </text:span><text:span text:style-name="Source_20_Text"><text:span text:style-name="T2">const float*</text:span></text:span><text:span text:style-name="T6"> conversions that </text:span><text:span text:style-name="Source_20_Text"><text:span text:style-name="T2">Vec3</text:span></text:span><text:span text:style-name="T6">/</text:span><text:span text:style-name="Source_20_Text"><text:span text:style-name="T2">Vec4</text:span></text:span><text:span text:style-name="T6"> have, so it can't be handed to APIs the same way. If </text:span><text:span text:style-name="Source_20_Text"><text:span text:style-name="T2">Vec2</text:span></text:span><text:span text:style-name="T6"> is meant for real use (it is, in Sem 1), give it the same surface as its siblings.</text:span></text:p>
        </text:list-item>
        <text:list-item>
          <text:p text:style-name="P7"><text:span text:style-name="T7">Windows macro collisions.</text:span><text:span text:style-name="T6"> </text:span><text:span text:style-name="Source_20_Text"><text:span text:style-name="T2">MMath::NDCtoViewport</text:span></text:span><text:span text:style-name="T6"> declares locals named </text:span><text:span text:style-name="Source_20_Text"><text:span text:style-name="T2">near</text:span></text:span><text:span text:style-name="T6"> and </text:span><text:span text:style-name="Source_20_Text"><text:span text:style-name="T2">far</text:span></text:span><text:span text:style-name="T6">, which are macros in </text:span><text:span text:style-name="Source_20_Text"><text:span text:style-name="T2">windef.h</text:span></text:span><text:span text:style-name="T6">. If any translation unit pulls in </text:span><text:span text:style-name="Source_20_Text"><text:span text:style-name="T2">windows.h</text:span></text:span><text:span text:style-name="T6"> before this header, it won't compile. Rename to </text:span><text:span text:style-name="Source_20_Text"><text:span text:style-name="T2">nearVal</text:span></text:span><text:span text:style-name="T6">/</text:span><text:span text:style-name="Source_20_Text"><text:span text:style-name="T2">farVal</text:span></text:span><text:span text:style-name="T6">.</text:span></text:p>
        </text:list-item>
        <text:list-item>
          <text:p text:style-name="P7"><text:span text:style-name="T7">Lead with the readable implementation.</text:span><text:span text:style-name="T6"> </text:span><text:span text:style-name="Source_20_Text"><text:span text:style-name="T2">Matrix4::operator*</text:span></text:span><text:span text:style-name="T6"> is a fully hand-unrolled 16-line expression with an "8 nanoseconds faster" comment, while the clear nested-loop version sits commented-out beside it. For a course that explicitly values readability over speed, make the loop version the live code and keep the unrolled one as the "optimization" footnote.</text:span></text:p>
        </text:list-item>
        <text:list-item>
          <text:p text:style-name="P7"><text:span text:style-name="T7">One header pulls in everything.</text:span><text:span text:style-name="T6"> </text:span><text:span text:style-name="Source_20_Text"><text:span text:style-name="T2">MathLib.h</text:span></text:span><text:span text:style-name="T6"> includes </text:span><text:span text:style-name="Source_20_Text"><text:span text:style-name="T2">Fourier</text:span></text:span><text:span text:style-name="T6">, </text:span><text:span text:style-name="Source_20_Text"><text:span text:style-name="T2">DualQuat</text:span></text:span><text:span text:style-name="T6">, </text:span><text:span text:style-name="Source_20_Text"><text:span text:style-name="T2">AAMath</text:span></text:span><text:span text:style-name="T6">, etc. A Sem 1 student needs only </text:span><text:span text:style-name="Source_20_Text"><text:span text:style-name="T2">Vector</text:span></text:span><text:span text:style-name="T6"> + </text:span><text:span text:style-name="Source_20_Text"><text:span text:style-name="T2">Matrix</text:span></text:span><text:span text:style-name="T6"> + </text:span><text:span text:style-name="Source_20_Text"><text:span text:style-name="T2">VMath</text:span></text:span><text:span text:style-name="T6"> + </text:span><text:span text:style-name="Source_20_Text"><text:span text:style-name="T2">MMath</text:span></text:span><text:span text:style-name="T6">. A lean </text:span><text:span text:style-name="Source_20_Text"><text:span text:style-name="T2">MathBasics.h</text:span></text:span><text:span text:style-name="T6"> (just those four) would keep early compiles fast and the surface small, with </text:span><text:span text:style-name="Source_20_Text"><text:span text:style-name="T2">MathLib.h</text:span></text:span><text:span text:style-name="T6"> reserved for later semesters.</text:span></text:p>
        </text:list-item>
        <text:list-item>
          <text:p text:style-name="P8"><text:span text:style-name="T7">Minor:</text:span><text:span text:style-name="T6"> </text:span><text:span text:style-name="Source_20_Text"><text:span text:style-name="T2">FLOAT_PI 3.141592f</text:span></text:span><text:span text:style-name="T6"> is less precise than a </text:span><text:span text:style-name="Source_20_Text"><text:span text:style-name="T2">float</text:span></text:span><text:span text:style-name="T6"> can hold (</text:span><text:span text:style-name="Source_20_Text"><text:span text:style-name="T2">3.1415927f</text:span></text:span><text:span text:style-name="T6">); the quaternion </text:span><text:span text:style-name="Source_20_Text"><text:span text:style-name="T2">set(float w_, float x_, float y_, float z_)</text:span></text:span><text:span text:style-name="T6"> lists </text:span><text:span text:style-name="Source_20_Text"><text:span text:style-name="T2">w</text:span></text:span><text:span text:style-name="T6"> first while the in-memory order is </text:span><text:span text:style-name="Source_20_Text"><text:span text:style-name="T2">i,j,k,w</text:span></text:span><text:span text:style-name="T6">, which is easy to misread.</text:span></text:p>
        </text:list-item>
      </text:list>
      <text:p text:style-name="P9">Priority order for fixing: bugs <text:span text:style-name="T9">1–6</text:span> first (correctness), then the rename sweep <text:span text:style-name="T9">7–8</text:span> (touches every project's call sites, so do it once and rebuild all four), then the rest as polish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, 'Aptos EmbeddedFont', 'Aptos MSFontService', Calibri, Helvetica, sans-serif, serif, EmojiFont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17:10:29.256406600</meta:creation-date>
    <dc:date>2026-06-20T17:36:13.608396200</dc:date>
    <meta:editing-duration>PT15M29S</meta:editing-duration>
    <meta:editing-cycles>1</meta:editing-cycles>
    <meta:document-statistic meta:table-count="0" meta:image-count="0" meta:object-count="0" meta:page-count="3" meta:paragraph-count="20" meta:word-count="905" meta:character-count="5692" meta:non-whitespace-character-count="4820"/>
    <meta:generator>LibreOffice/25.8.6.2$Windows_X86_64 LibreOffice_project/b4b39682cd9868fa725bc664aff94278d315bd04</meta:generator>
  </office:meta>
</office:document-meta>
</file>